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4084" officeooo:paragraph-rsid="000940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898130280019 → 9.00</text:p>
      <text:p text:style-name="P1">7898130280019 (só a parte do rodo, sem o cabo → 6.00) total: 15,00 deb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9T16:34:00.780669222</meta:creation-date>
    <meta:editing-duration>PT10M11S</meta:editing-duration>
    <meta:editing-cycles>2</meta:editing-cycles>
    <meta:generator>LibreOffice/24.2.7.2$Linux_X86_64 LibreOffice_project/420$Build-2</meta:generator>
    <dc:date>2026-06-09T16:44:09.251980815</dc:date>
    <meta:document-statistic meta:table-count="0" meta:image-count="0" meta:object-count="0" meta:page-count="1" meta:paragraph-count="2" meta:word-count="17" meta:character-count="90" meta:non-whitespace-character-count="75"/>
  </office:meta>
</office:document-meta>
</file>