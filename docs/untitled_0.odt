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d49" officeooo:paragraph-rsid="00012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268255738"/>7898912702418<text:bookmark-end text:name="__DdeLink__0_268255738"/></text:p>
      <text:p text:style-name="P1">7898912702418</text:p>
      <text:p text:style-name="P1">26,00 c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8:34:47.545821064</meta:creation-date>
    <dc:date>2026-04-06T18:45:04.180566813</dc:date>
    <meta:editing-duration>PT10M19S</meta:editing-duration>
    <meta:editing-cycles>1</meta:editing-cycles>
    <meta:document-statistic meta:table-count="0" meta:image-count="0" meta:object-count="0" meta:page-count="1" meta:paragraph-count="3" meta:word-count="4" meta:character-count="36" meta:non-whitespace-character-count="35"/>
    <meta:generator>LibreOffice/24.2.7.2$Linux_X86_64 LibreOffice_project/420$Build-2</meta:generator>
  </office:meta>
</office:document-meta>
</file>