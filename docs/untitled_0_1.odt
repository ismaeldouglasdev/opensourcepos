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0_3976917244"/>7897568400327<text:bookmark-end text:name="__DdeLink__0_397691724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4T11:20:38.563656866</meta:creation-date>
    <dc:date>2026-06-04T11:30:50.923212897</dc:date>
    <meta:editing-duration>PT10M14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24.2.7.2$Linux_X86_64 LibreOffice_project/420$Build-2</meta:generator>
  </office:meta>
</office:document-meta>
</file>